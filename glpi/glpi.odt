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Preformatted_20_Text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i está o <text:span text:style-name="Source_20_Text">docker-compose.yml</text:span> atualizado para usar <text:span text:style-name="Strong_20_Emphasis">MariaDB</text:span> em vez de MySQL, mantendo a persistência de todos os dados do GLPI.</text:p>
      <text:p text:style-name="Horizontal_20_Line"/>
      <text:h text:style-name="Heading_20_3" text:outline-level="3">📜 <text:span text:style-name="Strong_20_Emphasis">Arquivo </text:span><text:span text:style-name="Strong_20_Emphasis"><text:span text:style-name="Source_20_Text">docker-compose.yml</text:span></text:span><text:span text:style-name="Strong_20_Emphasis"> atualizado</text:span></text:h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glpi-db:</text:span></text:p>
      <text:p text:style-name="Preformatted_20_Text"><text:span text:style-name="Source_20_Text"><text:s text:c="4"/>image: mariadb:10.5</text:span></text:p>
      <text:p text:style-name="Preformatted_20_Text"><text:span text:style-name="Source_20_Text"><text:s text:c="4"/>container_name: glpi-db</text:span></text:p>
      <text:p text:style-name="Preformatted_20_Text"><text:span text:style-name="Source_20_Text"><text:s text:c="4"/>restart: always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</text:span></text:p>
      <text:p text:style-name="Preformatted_20_Text"><text:span text:style-name="Source_20_Text"><text:s text:c="6"/>MYSQL_DATABASE: glpi</text:span></text:p>
      <text:p text:style-name="Preformatted_20_Text"><text:span text:style-name="Source_20_Text"><text:s text:c="6"/>MYSQL_USER: glpi</text:span></text:p>
      <text:p text:style-name="Preformatted_20_Text"><text:span text:style-name="Source_20_Text"><text:s text:c="6"/>MYSQL_PASSWORD: glpi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mysql_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glpi-network</text:span></text:p>
      <text:p text:style-name="Preformatted_20_Text"/>
      <text:p text:style-name="Preformatted_20_Text"><text:span text:style-name="Source_20_Text"><text:s text:c="2"/>glpi:</text:span></text:p>
      <text:p text:style-name="Preformatted_20_Text"><text:span text:style-name="Source_20_Text"><text:s text:c="4"/>image: diouxx/glpi</text:span></text:p>
      <text:p text:style-name="Preformatted_20_Text"><text:span text:style-name="Source_20_Text"><text:s text:c="4"/>container_name: glpi</text:span></text:p>
      <text:p text:style-name="Preformatted_20_Text"><text:span text:style-name="Source_20_Text"><text:s text:c="4"/>restart: always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80:8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TIMEZONE: America/Sao_Paulo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glpi_data:/var/www/html/glpi</text:span></text:p>
      <text:p text:style-name="Preformatted_20_Text"><text:span text:style-name="Source_20_Text"><text:s text:c="6"/>- ./glpi_plugins:/var/www/html/glpi/plugins</text:span></text:p>
      <text:p text:style-name="Preformatted_20_Text"><text:span text:style-name="Source_20_Text"><text:s text:c="6"/>- ./glpi_files:/var/www/html/glpi/files</text:span></text:p>
      <text:p text:style-name="Preformatted_20_Text"><text:span text:style-name="Source_20_Text"><text:s text:c="6"/>- ./glpi_configs:/var/www/html/glpi/config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glpi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glpi-db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glpi-network:</text:span></text:p>
      <text:p text:style-name="P1"><text:span text:style-name="Source_20_Text"><text:s text:c="4"/>driver: bridge</text:span></text:p>
      <text:p text:style-name="Horizontal_20_Line"/>
      <text:h text:style-name="Heading_20_3" text:outline-level="3">📌 <text:span text:style-name="Strong_20_Emphasis">O que foi alterado?</text:span></text:h>
      <text:p text:style-name="Text_20_body">✅ <text:span text:style-name="Strong_20_Emphasis">Substituído o MySQL pelo MariaDB 10.5</text:span> → Melhor compatibilidade e desempenho.<text:line-break/>✅ <text:span text:style-name="Strong_20_Emphasis">Mantida a persistência dos dados</text:span> em <text:span text:style-name="Source_20_Text">./mysql_data</text:span> para o banco e demais pastas do GLPI.</text:p>
      <text:p text:style-name="Horizontal_20_Line"/>
      <text:h text:style-name="Heading_20_3" text:outline-level="3">🚀 <text:span text:style-name="Strong_20_Emphasis">Passos para rodar</text:span></text:h>
      <text:list text:style-name="L1">
        <text:list-item>
          <text:p text:style-name="P2"><text:span text:style-name="Strong_20_Emphasis">Criar os diretórios para armazenar os dados</text:span>: </text:p>
          <text:p text:style-name="P3"><text:span text:style-name="Source_20_Text">mkdir -p glpi_data glpi_plugins glpi_files glpi_configs mysql_data</text:span></text:p>
        </text:list-item>
        <text:list-item>
          <text:p text:style-name="P2"><text:soft-page-break/><text:span text:style-name="Strong_20_Emphasis">Subir os contêineres</text:span>: </text:p>
          <text:p text:style-name="P3"><text:span text:style-name="Source_20_Text">docker-compose up -d</text:span></text:p>
        </text:list-item>
        <text:list-item>
          <text:p text:style-name="P4"><text:span text:style-name="Strong_20_Emphasis">Acessar o GLPI</text:span> em <text:a xlink:type="simple" xlink:href="http://localhost:8080/" text:style-name="Internet_20_link" text:visited-style-name="Visited_20_Internet_20_Link"><text:span text:style-name="Strong_20_Emphasis">http://localhost:8080</text:span></text:a> </text:p>
        </text:list-item>
        <text:list-item>
          <text:p text:style-name="P4"><text:span text:style-name="Strong_20_Emphasis">Fazer login</text:span> com: </text:p>
          <text:list>
            <text:list-item>
              <text:p text:style-name="P4">Usuário: <text:span text:style-name="Source_20_Text">glpi</text:span> </text:p>
            </text:list-item>
            <text:list-item>
              <text:p text:style-name="P2">Senha: <text:span text:style-name="Source_20_Text">glpi</text:span>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Se já rodou antes com MySQL</text:span></text:h>
      <text:p text:style-name="Text_20_body">Se estava rodando o MySQL antes e quer trocar pelo MariaDB, siga estes passos:</text:p>
      <text:list text:style-name="L2">
        <text:list-item>
          <text:p text:style-name="P5"><text:span text:style-name="Strong_20_Emphasis">Derrubar os contêineres antigos</text:span>: </text:p>
          <text:p text:style-name="P6"><text:span text:style-name="Source_20_Text">docker-compose down</text:span></text:p>
        </text:list-item>
        <text:list-item>
          <text:p text:style-name="P5"><text:span text:style-name="Strong_20_Emphasis">Fazer backup dos dados antes de excluir</text:span> (opcional): </text:p>
          <text:p text:style-name="P6"><text:span text:style-name="Source_20_Text">docker exec -it glpi-db mysqldump -u root -p glpi &gt; backup.sql</text:span></text:p>
        </text:list-item>
        <text:list-item>
          <text:p text:style-name="P5"><text:span text:style-name="Strong_20_Emphasis">Remover dados antigos do MySQL</text:span> (⚠️ Apaga os dados anteriores!): </text:p>
          <text:p text:style-name="P6"><text:span text:style-name="Source_20_Text">rm -rf mysql_data</text:span></text:p>
        </text:list-item>
        <text:list-item>
          <text:p text:style-name="P5"><text:span text:style-name="Strong_20_Emphasis">Criar novamente as pastas e subir o ambiente</text:span>: </text:p>
          <text:p text:style-name="P7"><text:span text:style-name="Source_20_Text">mkdir -p mysql_data</text:span></text:p>
          <text:p text:style-name="P6"><text:span text:style-name="Source_20_Text">docker-compose up -d</text:span></text:p>
        </text:list-item>
      </text:list>
      <text:p text:style-name="Text_20_body">Se precisar de ajustes ou quiser um banco externo, só avisar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09:48:42.044478120</meta:creation-date>
    <dc:date>2025-03-12T09:51:05.486486345</dc:date>
    <meta:editing-duration>PT2M24S</meta:editing-duration>
    <meta:editing-cycles>1</meta:editing-cycles>
    <meta:document-statistic meta:table-count="0" meta:image-count="0" meta:object-count="0" meta:page-count="2" meta:paragraph-count="60" meta:word-count="246" meta:character-count="1876" meta:non-whitespace-character-count="1540"/>
    <meta:generator>LibreOffice/25.2.1.2$Linux_X86_64 LibreOffice_project/520$Build-2</meta:generator>
  </office:meta>
</office:document-meta>
</file>